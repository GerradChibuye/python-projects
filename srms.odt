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h text:style-name="Heading_20_2" text:outline-level="2">“Student Record Management System”</text:h>
      <text:p text:style-name="Text_20_body">This project was developed using the Python programming language, Tkinter for the graphical user interface, and SQLite for database management.</text:p>
      <text:p text:style-name="Horizontal_20_Line"/>
      <text:h text:style-name="Heading_20_1" text:outline-level="1">Project Overview</text:h>
      <text:p text:style-name="Text_20_body">The main purpose of this system is to help manage student records efficiently.</text:p>
      <text:p text:style-name="Text_20_body">The system allows users to:</text:p>
      <text:list text:style-name="L1">
        <text:list-item>
          <text:p text:style-name="P1">Add student records</text:p>
        </text:list-item>
        <text:list-item>
          <text:p text:style-name="P1">Update student information</text:p>
        </text:list-item>
        <text:list-item>
          <text:p text:style-name="P1">Delete records</text:p>
        </text:list-item>
        <text:list-item>
          <text:p text:style-name="P1">Search for students</text:p>
        </text:list-item>
        <text:list-item>
          <text:p text:style-name="P1">Manage registration queues</text:p>
        </text:list-item>
        <text:list-item>
          <text:p text:style-name="P1">Undo operations</text:p>
        </text:list-item>
        <text:list-item>
          <text:p text:style-name="P1">Login and register users securely</text:p>
        </text:list-item>
      </text:list>
      <text:p text:style-name="Text_20_body">The project also demonstrates the implementation of three important data structures.</text:p>
      <text:p text:style-name="Horizontal_20_Line"/>
      <text:h text:style-name="Heading_20_1" text:outline-level="1">Technologies Used</text:h>
      <text:p text:style-name="Text_20_body">The technologies used in this project are:</text:p>
      <text:list text:style-name="L2">
        <text:list-item>
          <text:p text:style-name="P2">Python</text:p>
        </text:list-item>
        <text:list-item>
          <text:p text:style-name="P2">Tkinter GUI</text:p>
        </text:list-item>
        <text:list-item>
          <text:p text:style-name="P2">SQLite Database</text:p>
        </text:list-item>
        <text:list-item>
          <text:p text:style-name="P2">JSON for user login storage</text:p>
        </text:list-item>
      </text:list>
      <text:p text:style-name="Horizontal_20_Line"/>
      <text:h text:style-name="Heading_20_1" text:outline-level="1">Data Structures Used</text:h>
      <text:p text:style-name="Text_20_body">This project implements three data structures:</text:p>
      <text:p text:style-name="Horizontal_20_Line"/>
      <text:h text:style-name="Heading_20_2" text:outline-level="2"><text:soft-page-break/>1. Stack</text:h>
      <text:p text:style-name="Text_20_body">The first data structure is a Stack.</text:p>
      <text:p text:style-name="Text_20_body">The stack follows the LIFO principle, which means “Last In, First Out”.</text:p>
      <text:p text:style-name="Text_20_body">In this system, the stack is used for the Undo feature.</text:p>
      <text:p text:style-name="Text_20_body">Whenever a user adds, updates, or deletes a student, the action is pushed into the stack.</text:p>
      <text:p text:style-name="Text_20_body">When the Undo button is clicked, the last action performed is reversed.</text:p>
      <text:p text:style-name="Text_20_body">Example:</text:p>
      <text:list text:style-name="L3">
        <text:list-item>
          <text:p text:style-name="P3">If a student is deleted,</text:p>
        </text:list-item>
        <text:list-item>
          <text:p text:style-name="P3">Undo restores that student.</text:p>
        </text:list-item>
      </text:list>
      <text:p text:style-name="Horizontal_20_Line"/>
      <text:h text:style-name="Heading_20_2" text:outline-level="2">2. Queue</text:h>
      <text:p text:style-name="Text_20_body">The second data structure is a Queue.</text:p>
      <text:p text:style-name="Text_20_body">The queue follows the FIFO principle, meaning “First In, First Out”.</text:p>
      <text:p text:style-name="Text_20_body">In this system, the queue is used to manage student registration processing.</text:p>
      <text:p text:style-name="Text_20_body">Students are added to the queue using the “Add to Queue” button.</text:p>
      <text:p text:style-name="Text_20_body">The “Process Queue” button processes students in the exact order they entered the queue.</text:p>
      <text:p text:style-name="Horizontal_20_Line"/>
      <text:h text:style-name="Heading_20_2" text:outline-level="2">3. Linked List</text:h>
      <text:p text:style-name="Text_20_body">The third data structure is a Linked List.</text:p>
      <text:p text:style-name="Text_20_body">The linked list stores student records using nodes connected together.</text:p>
      <text:p text:style-name="Text_20_body">Each node contains:</text:p>
      <text:list text:style-name="L4">
        <text:list-item>
          <text:p text:style-name="P4">Student data</text:p>
        </text:list-item>
        <text:list-item>
          <text:p text:style-name="P4">A pointer to the next node</text:p>
        </text:list-item>
      </text:list>
      <text:p text:style-name="Text_20_body">The linked list is used for:</text:p>
      <text:list text:style-name="L5">
        <text:list-item>
          <text:p text:style-name="P5">Traversing student records</text:p>
        </text:list-item>
        <text:list-item>
          <text:p text:style-name="P5">Searching records</text:p>
        </text:list-item>
        <text:list-item>
          <text:p text:style-name="P5">Displaying linked list contents</text:p>
        </text:list-item>
      </text:list>
      <text:p text:style-name="Text_20_body">This demonstrates dynamic data storage and traversal.</text:p>
      <text:p text:style-name="Horizontal_20_Line"/>
      <text:h text:style-name="Heading_20_1" text:outline-level="1"><text:soft-page-break/>Database Functionality</text:h>
      <text:p text:style-name="Text_20_body">The system uses SQLite as the database.</text:p>
      <text:p text:style-name="Text_20_body">The database stores:</text:p>
      <text:list text:style-name="L6">
        <text:list-item>
          <text:p text:style-name="P6">Student ID</text:p>
        </text:list-item>
        <text:list-item>
          <text:p text:style-name="P6">Student Name</text:p>
        </text:list-item>
        <text:list-item>
          <text:p text:style-name="P6">Program</text:p>
        </text:list-item>
        <text:list-item>
          <text:p text:style-name="P6">Year</text:p>
        </text:list-item>
      </text:list>
      <text:p text:style-name="Text_20_body">The system performs CRUD operations:</text:p>
      <text:list text:style-name="L7">
        <text:list-item>
          <text:p text:style-name="P7">Create</text:p>
        </text:list-item>
        <text:list-item>
          <text:p text:style-name="P7">Read</text:p>
        </text:list-item>
        <text:list-item>
          <text:p text:style-name="P7">Update</text:p>
        </text:list-item>
        <text:list-item>
          <text:p text:style-name="P7">Delete</text:p>
        </text:list-item>
      </text:list>
      <text:p text:style-name="Text_20_body">All student information is saved permanently in the database.</text:p>
      <text:p text:style-name="Horizontal_20_Line"/>
      <text:h text:style-name="Heading_20_1" text:outline-level="1">Login System</text:h>
      <text:p text:style-name="Text_20_body">The project also includes a login and registration system.</text:p>
      <text:p text:style-name="Text_20_body">Users can:</text:p>
      <text:list text:style-name="L8">
        <text:list-item>
          <text:p text:style-name="P8">Create accounts</text:p>
        </text:list-item>
        <text:list-item>
          <text:p text:style-name="P8">Login securely</text:p>
        </text:list-item>
        <text:list-item>
          <text:p text:style-name="P8">Access the system after authentication</text:p>
        </text:list-item>
      </text:list>
      <text:p text:style-name="Text_20_body">User credentials are stored in a JSON file.</text:p>
      <text:p text:style-name="Horizontal_20_Line"/>
      <text:h text:style-name="Heading_20_1" text:outline-level="1">User Interface</text:h>
      <text:p text:style-name="Text_20_body">The graphical interface was built using Tkinter.</text:p>
      <text:p text:style-name="Text_20_body">The interface contains:</text:p>
      <text:list text:style-name="L9">
        <text:list-item>
          <text:p text:style-name="P9">Input fields</text:p>
        </text:list-item>
        <text:list-item>
          <text:p text:style-name="P9">Action buttons</text:p>
        </text:list-item>
        <text:list-item>
          <text:p text:style-name="P9">Queue management section</text:p>
        </text:list-item>
        <text:list-item>
          <text:p text:style-name="P9">Student database display</text:p>
        </text:list-item>
      </text:list>
      <text:p text:style-name="Text_20_body"><text:soft-page-break/>The interface was designed to be simple, clean, and user friendly.</text:p>
      <text:p text:style-name="Horizontal_20_Line"/>
      <text:h text:style-name="Heading_20_1" text:outline-level="1">Demonstration</text:h>
      <text:p text:style-name="Text_20_body">Now I will demonstrate how the system works.</text:p>
      <text:h text:style-name="Heading_20_3" text:outline-level="3">Demonstration Steps:</text:h>
      <text:list text:style-name="L10">
        <text:list-item>
          <text:p text:style-name="P10">Login into the system</text:p>
        </text:list-item>
        <text:list-item>
          <text:p text:style-name="P10">Add a student</text:p>
        </text:list-item>
        <text:list-item>
          <text:p text:style-name="P10">Search for a student</text:p>
        </text:list-item>
        <text:list-item>
          <text:p text:style-name="P10">Update student information</text:p>
        </text:list-item>
        <text:list-item>
          <text:p text:style-name="P10">Delete a student</text:p>
        </text:list-item>
        <text:list-item>
          <text:p text:style-name="P10">Undo the delete action</text:p>
        </text:list-item>
        <text:list-item>
          <text:p text:style-name="P10">Add students to queue</text:p>
        </text:list-item>
        <text:list-item>
          <text:p text:style-name="P10">Process queue</text:p>
        </text:list-item>
        <text:list-item>
          <text:p text:style-name="P10">Show linked list contents</text:p>
        </text:list-item>
      </text:list>
      <text:p text:style-name="Horizontal_20_Line"/>
      <text:h text:style-name="Heading_20_1" text:outline-level="1">Challenges Faced</text:h>
      <text:p text:style-name="Text_20_body">Some of the challenges faced included:</text:p>
      <text:list text:style-name="L11">
        <text:list-item>
          <text:p text:style-name="P11">Connecting the GUI with the database</text:p>
        </text:list-item>
        <text:list-item>
          <text:p text:style-name="P11">Implementing Undo functionality using Stack</text:p>
        </text:list-item>
        <text:list-item>
          <text:p text:style-name="P11">Synchronizing the Linked List with database records</text:p>
        </text:list-item>
        <text:list-item>
          <text:p text:style-name="P11">Managing queue operations correctly</text:p>
        </text:list-item>
      </text:list>
      <text:p text:style-name="Text_20_body">These challenges helped improve understanding of data structures and Python programming.</text:p>
      <text:p text:style-name="Horizontal_20_Line"/>
      <text:h text:style-name="Heading_20_1" text:outline-level="1">Conclusion</text:h>
      <text:p text:style-name="Text_20_body">In conclusion, this project successfully demonstrates:</text:p>
      <text:list text:style-name="L12">
        <text:list-item>
          <text:p text:style-name="P12">Database management</text:p>
        </text:list-item>
        <text:list-item>
          <text:p text:style-name="P12">GUI programming</text:p>
        </text:list-item>
        <text:list-item>
          <text:p text:style-name="P12">User authentication</text:p>
        </text:list-item>
        <text:list-item>
          <text:p text:style-name="P12">Implementation of Stack, Queue, and Linked List data structures</text:p>
        </text:list-item>
      </text:list>
      <text:p text:style-name="Text_20_body"><text:soft-page-break/>The system improves efficiency in managing student records and provides practical use of data structures in real-world applications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2T10:09:15.360326551</meta:creation-date>
    <dc:date>2026-05-12T10:10:56.485792295</dc:date>
    <meta:editing-duration>PT1M4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5" meta:paragraph-count="101" meta:word-count="558" meta:character-count="3366" meta:non-whitespace-character-count="2959"/>
  </office:meta>
</office:document-meta>
</file>